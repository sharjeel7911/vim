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RW Bookman" svg:font-family="'URW Bookman'" style:font-pitch="variable"/>
    <style:font-face style:name="var font-mono" svg:font-family="'var font-mono'"/>
  </office:font-face-decls>
  <office:automatic-styles>
    <style:style style:name="P1" style:family="paragraph" style:parent-style-name="Horizontal_20_Line">
      <style:text-properties fo:color="#000000" loext:opacity="100%"/>
    </style:style>
    <style:style style:name="P2" style:family="paragraph" style:parent-style-name="Horizontal_20_Line">
      <style:text-properties style:font-name="URW Bookman"/>
    </style:style>
    <style:style style:name="P3" style:family="paragraph" style:parent-style-name="Heading_20_1">
      <style:text-properties fo:color="#000000" loext:opacity="100%" style:font-name="URW Bookman"/>
    </style:style>
    <style:style style:name="P4" style:family="paragraph" style:parent-style-name="Heading_20_2">
      <style:text-properties fo:color="#000000" loext:opacity="100%"/>
    </style:style>
    <style:style style:name="P5" style:family="paragraph" style:parent-style-name="Heading_20_2">
      <style:text-properties fo:color="#000000" loext:opacity="100%" style:font-name="URW Bookman"/>
    </style:style>
    <style:style style:name="P6" style:family="paragraph" style:parent-style-name="Heading_20_2">
      <style:text-properties style:font-name="URW Bookman"/>
    </style:style>
    <style:style style:name="P7" style:family="paragraph" style:parent-style-name="Heading_20_3">
      <style:text-properties fo:color="#000000" loext:opacity="100%"/>
    </style:style>
    <style:style style:name="P8" style:family="paragraph" style:parent-style-name="Heading_20_3">
      <style:text-properties style:font-name="URW Bookman"/>
    </style:style>
    <style:style style:name="P9" style:family="paragraph" style:parent-style-name="Preformatted_20_Text">
      <loext:graphic-properties draw:fill="none" draw:fill-color="#ffffff"/>
      <style:paragraph-properties fo:background-color="transparent"/>
    </style:style>
    <style:style style:name="P10" style:family="paragraph" style:parent-style-name="Preformatted_20_Text">
      <loext:graphic-properties draw:fill="none" draw:fill-color="#ffffff"/>
      <style:paragraph-properties fo:margin-left="0in" fo:margin-right="0in" fo:text-indent="0in" style:auto-text-indent="false" fo:background-color="transparent"/>
    </style:style>
    <style:style style:name="P11" style:family="paragraph" style:parent-style-name="Preformatted_20_Text">
      <loext:graphic-properties draw:fill="none" draw:fill-color="#ffffff"/>
      <style:paragraph-properties fo:margin-left="0in" fo:margin-right="0in" fo:margin-top="0in" fo:margin-bottom="0.1965in" style:contextual-spacing="false" fo:text-indent="0in" style:auto-text-indent="false" fo:background-color="transparent"/>
    </style:style>
    <style:style style:name="P12" style:family="paragraph" style:parent-style-name="Preformatted_20_Text">
      <style:paragraph-properties fo:margin-top="0in" fo:margin-bottom="0.1965in" style:contextual-spacing="false"/>
    </style:style>
    <style:style style:name="P13" style:family="paragraph" style:parent-style-name="Preformatted_20_Text">
      <loext:graphic-properties draw:fill="none" draw:fill-color="#ffffff"/>
      <style:paragraph-properties fo:margin-top="0in" fo:margin-bottom="0.1965in" style:contextual-spacing="false" fo:background-color="transparent"/>
    </style:style>
    <style:style style:name="P14" style:family="paragraph" style:parent-style-name="Preformatted_20_Text">
      <loext:graphic-properties draw:fill="none" draw:fill-color="#ffffff"/>
      <style:paragraph-properties fo:background-color="transparent"/>
      <style:text-properties fo:color="#000000" loext:opacity="100%"/>
    </style:style>
    <style:style style:name="P15" style:family="paragraph" style:parent-style-name="Preformatted_20_Text">
      <style:text-properties style:font-name="URW Bookman"/>
    </style:style>
    <style:style style:name="P16" style:family="paragraph" style:parent-style-name="Text_20_body">
      <style:text-properties fo:color="#000000" loext:opacity="100%"/>
    </style:style>
    <style:style style:name="P17" style:family="paragraph" style:parent-style-name="Text_20_body">
      <style:text-properties style:font-name="URW Bookman"/>
    </style:style>
    <style:style style:name="T1" style:family="text">
      <style:text-properties style:font-name="var font-mono" fo:background-color="transparent" loext:char-shading-value="0"/>
    </style:style>
    <style:style style:name="T2" style:family="text">
      <style:text-properties fo:color="#eaecf0" loext:opacity="100%" style:font-name="var font-mono" fo:background-color="transparent" loext:char-shading-value="0"/>
    </style:style>
    <style:style style:name="T3" style:family="text">
      <style:text-properties fo:color="#eaecf0" loext:opacity="100%" fo:background-color="transparent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style:font-name="var font-mono" fo:background-color="transparent" loext:char-shading-value="0"/>
    </style:style>
    <style:style style:name="T7" style:family="text">
      <style:text-properties fo:color="#000000" loext:opacity="100%" fo:background-color="transparent" loext:char-shading-value="0"/>
    </style:style>
    <style:style style:name="T8" style:family="text">
      <style:text-properties style:font-name="URW Book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Terminal Editor - Quick Command Cheatsheet</text:h>
      <text:h text:style-name="P6" text:outline-level="2">MODE SWITCHING</text:h>
      <text:p text:style-name="Preformatted_20_Text"><text:span text:style-name="Source_20_Text"><text:span text:style-name="T8">i <text:s text:c="6"/>→ Enter INSERT mode</text:span></text:span></text:p>
      <text:p text:style-name="Preformatted_20_Text"><text:span text:style-name="Source_20_Text"><text:span text:style-name="T8">: <text:s text:c="6"/>→ Enter COMMAND mode</text:span></text:span></text:p>
      <text:p text:style-name="P12"><text:span text:style-name="Source_20_Text"><text:span text:style-name="T8">ESC <text:s text:c="4"/>→ Exit to NORMAL mode</text:span></text:span></text:p>
      <text:p text:style-name="P2"/>
      <text:h text:style-name="P6" text:outline-level="2">NORMAL MODE - NAVIGATION</text:h>
      <text:h text:style-name="P8" text:outline-level="3">Single Character Movement</text:h>
      <text:p text:style-name="Preformatted_20_Text"><text:span text:style-name="Source_20_Text"><text:span text:style-name="T8">h <text:s text:c="6"/>Move cursor left</text:span></text:span></text:p>
      <text:p text:style-name="Preformatted_20_Text"><text:span text:style-name="Source_20_Text"><text:span text:style-name="T8">l <text:s text:c="6"/>Move cursor right <text:s/></text:span></text:span></text:p>
      <text:p text:style-name="Preformatted_20_Text"><text:span text:style-name="Source_20_Text"><text:span text:style-name="T8">j <text:s text:c="6"/>Move cursor down (5j = down 5)</text:span></text:span></text:p>
      <text:p text:style-name="Preformatted_20_Text"><text:span text:style-name="Source_20_Text"><text:span text:style-name="T8">k <text:s text:c="6"/>Move cursor up <text:s text:c="2"/>(3k = up 3)</text:span></text:span></text:p>
      <text:p text:style-name="P15"/>
      <text:p text:style-name="P12"><text:span text:style-name="Source_20_Text"><text:span text:style-name="T8">← ↑ ↓ → (Arrow keys also work)</text:span></text:span></text:p>
      <text:h text:style-name="P8" text:outline-level="3">Word Movement</text:h>
      <text:p text:style-name="Preformatted_20_Text"><text:span text:style-name="Source_20_Text"><text:span text:style-name="T8">w <text:s text:c="6"/>Jump to start of next word</text:span></text:span></text:p>
      <text:p text:style-name="Preformatted_20_Text"><text:span text:style-name="Source_20_Text"><text:span text:style-name="T8">b <text:s text:c="6"/>Jump to start of previous word</text:span></text:span></text:p>
      <text:p text:style-name="Preformatted_20_Text"><text:span text:style-name="Source_20_Text"><text:span text:style-name="T8">e <text:s text:c="6"/>Jump to end of current/next word</text:span></text:span></text:p>
      <text:p text:style-name="P15"/>
      <text:p text:style-name="Preformatted_20_Text"><text:span text:style-name="Source_20_Text"><text:span text:style-name="T8">5w <text:s text:c="5"/>Jump forward 5 words</text:span></text:span></text:p>
      <text:p text:style-name="P12"><text:span text:style-name="Source_20_Text"><text:span text:style-name="T8">3b <text:s text:c="5"/>Jump backward 3 words</text:span></text:span></text:p>
      <text:h text:style-name="P8" text:outline-level="3">Line Movement</text:h>
      <text:p text:style-name="Preformatted_20_Text"><text:span text:style-name="Source_20_Text"><text:span text:style-name="T8">0 <text:s text:c="6"/>Jump to start of line</text:span></text:span></text:p>
      <text:p text:style-name="Preformatted_20_Text"><text:span text:style-name="Source_20_Text"><text:span text:style-name="T8">$ <text:s text:c="6"/>Jump to end of line</text:span></text:span></text:p>
      <text:p text:style-name="P12"><text:span text:style-name="Source_20_Text"><text:span text:style-name="T8">^ <text:s text:c="6"/>First non-whitespace char</text:span></text:span></text:p>
      <text:h text:style-name="P8" text:outline-level="3">File Navigation</text:h>
      <text:p text:style-name="Preformatted_20_Text"><text:span text:style-name="Source_20_Text"><text:span text:style-name="T8">gg <text:s text:c="5"/>Jump to start of file (line 1)</text:span></text:span></text:p>
      <text:p text:style-name="Preformatted_20_Text"><text:span text:style-name="Source_20_Text"><text:span text:style-name="T8">G <text:s text:c="6"/>Jump to end of file</text:span></text:span></text:p>
      <text:p text:style-name="P12"><text:span text:style-name="Source_20_Text"><text:span text:style-name="T8">5G <text:s text:c="5"/>Jump to line 5 (Ngg works too)</text:span></text:span></text:p>
      <text:p text:style-name="P2"/>
      <text:h text:style-name="P6" text:outline-level="2">NORMAL MODE - EDITING</text:h>
      <text:h text:style-name="P8" text:outline-level="3">Delete</text:h>
      <text:p text:style-name="Preformatted_20_Text"><text:span text:style-name="Source_20_Text"><text:span text:style-name="T8">x <text:s text:c="6"/>Delete char at cursor (can count: 3x = delete 3)</text:span></text:span></text:p>
      <text:p text:style-name="Preformatted_20_Text"><text:span text:style-name="Source_20_Text"><text:span text:style-name="T8">dd <text:s text:c="5"/>Delete entire line (5dd = delete 5 lines)</text:span></text:span></text:p>
      <text:p text:style-name="Preformatted_20_Text"><text:soft-page-break/><text:span text:style-name="Source_20_Text"><text:span text:style-name="T8">D <text:s text:c="6"/>Delete from cursor to end of line</text:span></text:span></text:p>
      <text:p text:style-name="P12"><text:span text:style-name="Source_20_Text"><text:span text:style-name="T8">J <text:s text:c="6"/>Join current line with next (remove newline)</text:span></text:span></text:p>
      <text:h text:style-name="P8" text:outline-level="3">Yank (Copy)</text:h>
      <text:p text:style-name="Preformatted_20_Text"><text:span text:style-name="Source_20_Text"><text:span text:style-name="T8">yy <text:s text:c="5"/>Copy current line (5yy = copy 5 lines)</text:span></text:span></text:p>
      <text:p text:style-name="P12"><text:span text:style-name="Source_20_Text"><text:span text:style-name="T8">Y <text:s text:c="6"/>Copy from cursor to end of line</text:span></text:span></text:p>
      <text:h text:style-name="P8" text:outline-level="3">Paste</text:h>
      <text:p text:style-name="Preformatted_20_Text"><text:span text:style-name="Source_20_Text"><text:span text:style-name="T8">p <text:s text:c="6"/>Paste after current line</text:span></text:span></text:p>
      <text:p text:style-name="P12"><text:span text:style-name="Source_20_Text"><text:span text:style-name="T8">P <text:s text:c="6"/>Paste before current line</text:span></text:span></text:p>
      <text:h text:style-name="P8" text:outline-level="3">Indent</text:h>
      <text:p text:style-name="Preformatted_20_Text"><text:span text:style-name="Source_20_Text"><text:span text:style-name="T8">&gt;&gt; <text:s text:c="5"/>Indent line right (add 4 spaces)</text:span></text:span></text:p>
      <text:p text:style-name="Preformatted_20_Text"><text:span text:style-name="Source_20_Text"><text:span text:style-name="T8">&lt;&lt; <text:s text:c="5"/>Unindent line left (remove 4 spaces)</text:span></text:span></text:p>
      <text:p text:style-name="P15"/>
      <text:p text:style-name="Preformatted_20_Text"><text:span text:style-name="Source_20_Text"><text:span text:style-name="T8">3&gt;&gt; <text:s text:c="4"/>Indent 3 lines right</text:span></text:span></text:p>
      <text:p text:style-name="P12"><text:span text:style-name="Source_20_Text"><text:span text:style-name="T8">2&lt;&lt; <text:s text:c="4"/>Unindent 2 lines left</text:span></text:span></text:p>
      <text:h text:style-name="P8" text:outline-level="3">Undo/Redo</text:h>
      <text:p text:style-name="Preformatted_20_Text"><text:span text:style-name="Source_20_Text"><text:span text:style-name="T8">u <text:s text:c="6"/>Undo last command</text:span></text:span></text:p>
      <text:p text:style-name="P12"><text:span text:style-name="Source_20_Text"><text:span text:style-name="T8">Ctrl+R <text:s/>Redo last undone command</text:span></text:span></text:p>
      <text:p text:style-name="Text_20_body"><text:span text:style-name="Strong_20_Emphasis"><text:span text:style-name="T8">Note:</text:span></text:span><text:span text:style-name="T8"> Each user command = one undo (typing "hello" = 1 undo, not 5)</text:span></text:p>
      <text:p text:style-name="P2"/>
      <text:h text:style-name="P6" text:outline-level="2">NORMAL MODE - SEARCH</text:h>
      <text:h text:style-name="P8" text:outline-level="3">Forward/Backward Search</text:h>
      <text:p text:style-name="Preformatted_20_Text"><text:span text:style-name="Source_20_Text"><text:span text:style-name="T8">/pattern <text:s text:c="7"/>Search forward for pattern (case-insensitive)</text:span></text:span></text:p>
      <text:p text:style-name="Preformatted_20_Text"><text:span text:style-name="Source_20_Text"><text:span text:style-name="T8">?pattern <text:s text:c="7"/>Search backward for pattern</text:span></text:span></text:p>
      <text:p text:style-name="Preformatted_20_Text"><text:span text:style-name="Source_20_Text"><text:span text:style-name="T8">n <text:s text:c="14"/>Go to next match</text:span></text:span></text:p>
      <text:p text:style-name="P12"><text:span text:style-name="Source_20_Text"><text:span text:style-name="T8">N <text:s text:c="14"/>Go to previous match</text:span></text:span></text:p>
      <text:p text:style-name="Text_20_body"><text:span text:style-name="Strong_20_Emphasis"><text:span text:style-name="T8">Example:</text:span></text:span></text:p>
      <text:p text:style-name="Preformatted_20_Text"><text:span text:style-name="Source_20_Text"><text:span text:style-name="T8">/TODO <text:s text:c="10"/>Search for "TODO"</text:span></text:span></text:p>
      <text:p text:style-name="Preformatted_20_Text"><text:span text:style-name="Source_20_Text"><text:span text:style-name="T8">n <text:s text:c="14"/>Jump to next occurrence</text:span></text:span></text:p>
      <text:p text:style-name="P12"><text:span text:style-name="Source_20_Text"><text:span text:style-name="T8">N <text:s text:c="14"/>Jump to previous occurrence</text:span></text:span></text:p>
      <text:p text:style-name="P17">Matches are highlighted in cyan background.</text:p>
      <text:p text:style-name="P2"/>
      <text:h text:style-name="P6" text:outline-level="2">INSERT MODE</text:h>
      <text:p text:style-name="Preformatted_20_Text"><text:span text:style-name="Source_20_Text"><text:span text:style-name="T8">Any printable character <text:s/>→ Insert at cursor</text:span></text:span></text:p>
      <text:p text:style-name="Preformatted_20_Text"><text:span text:style-name="Source_20_Text"><text:span text:style-name="T8">ENTER <text:s text:c="18"/>→ Insert newline</text:span></text:span></text:p>
      <text:p text:style-name="Preformatted_20_Text"><text:span text:style-name="Source_20_Text"><text:span text:style-name="T8">BACKSPACE <text:s text:c="14"/>→ Delete character before cursor</text:span></text:span></text:p>
      <text:p text:style-name="Preformatted_20_Text"><text:span text:style-name="Source_20_Text"><text:span text:style-name="T8">DELETE <text:s text:c="17"/>→ Delete character after cursor</text:span></text:span></text:p>
      <text:p text:style-name="Preformatted_20_Text"><text:soft-page-break/><text:span text:style-name="Source_20_Text"><text:span text:style-name="T8">TAB <text:s text:c="20"/>→ Insert 4 spaces</text:span></text:span></text:p>
      <text:p text:style-name="P15"/>
      <text:p text:style-name="Preformatted_20_Text"><text:span text:style-name="Source_20_Text"><text:span text:style-name="T8">↑ ↓ ← → <text:s text:c="16"/>Arrow keys to move cursor</text:span></text:span></text:p>
      <text:p text:style-name="P12"><text:span text:style-name="Source_20_Text"><text:span text:style-name="T8">ESC <text:s text:c="20"/>Exit to NORMAL mode</text:span></text:span></text:p>
      <text:p text:style-name="Text_20_body"><text:span text:style-name="Strong_20_Emphasis"><text:span text:style-name="T8">Note:</text:span></text:span><text:span text:style-name="T8"> Typed characters are undone as a group (e.g., type 10 chars, undo removes all 10)</text:span></text:p>
      <text:p text:style-name="P2"/>
      <text:h text:style-name="P6" text:outline-level="2">COMMAND MODE</text:h>
      <text:p text:style-name="Text_20_body"><text:span text:style-name="T8">Triggered by </text:span><text:span text:style-name="Source_20_Text"><text:span text:style-name="T8">:</text:span></text:span><text:span text:style-name="T8"> from NORMAL mode.</text:span></text:p>
      <text:h text:style-name="P8" text:outline-level="3">File Operations</text:h>
      <text:p text:style-name="Preformatted_20_Text"><text:span text:style-name="Source_20_Text"><text:span text:style-name="T8">:w <text:s text:c="13"/>Save current file</text:span></text:span></text:p>
      <text:p text:style-name="Preformatted_20_Text"><text:span text:style-name="Source_20_Text"><text:span text:style-name="T8">:w newfile.txt <text:s/>Save as new filename</text:span></text:span></text:p>
      <text:p text:style-name="Preformatted_20_Text"><text:span text:style-name="Source_20_Text"><text:span text:style-name="T8">:q <text:s text:c="13"/>Quit (if no unsaved changes)</text:span></text:span></text:p>
      <text:p text:style-name="Preformatted_20_Text"><text:span text:style-name="Source_20_Text"><text:span text:style-name="T8">:q! <text:s text:c="12"/>Force quit (discard changes)</text:span></text:span></text:p>
      <text:p text:style-name="Preformatted_20_Text"><text:span text:style-name="Source_20_Text"><text:span text:style-name="T8">:wq <text:s text:c="12"/>Save and quit</text:span></text:span></text:p>
      <text:p text:style-name="Preformatted_20_Text"><text:span text:style-name="Source_20_Text"><text:span text:style-name="T8">:e filename <text:s text:c="4"/>Open file for editing</text:span></text:span></text:p>
      <text:p text:style-name="Preformatted_20_Text"><text:span text:style-name="Source_20_Text"><text:span text:style-name="T8">:e! filename <text:s text:c="3"/>Force reload file from disk</text:span></text:span></text:p>
      <text:p text:style-name="P12"><text:span text:style-name="Source_20_Text"><text:span text:style-name="T8">:d N <text:s text:c="11"/>Delete line N (absolute line number)</text:span></text:span></text:p>
      <text:h text:style-name="P8" text:outline-level="3">Search &amp; Replace (Line-scoped)</text:h>
      <text:p text:style-name="Preformatted_20_Text"><text:span text:style-name="Source_20_Text"><text:span text:style-name="T8">:s/old/new <text:s text:c="5"/>Replace first occurrence on current line</text:span></text:span></text:p>
      <text:p text:style-name="P12"><text:span text:style-name="Source_20_Text"><text:span text:style-name="T8">:s/old/new/g <text:s text:c="3"/>Replace all occurrences on current line</text:span></text:span></text:p>
      <text:p text:style-name="Text_20_body"><text:span text:style-name="Strong_20_Emphasis"><text:span text:style-name="T8">Example:</text:span></text:span></text:p>
      <text:p text:style-name="Preformatted_20_Text"><text:span text:style-name="Source_20_Text"><text:span text:style-name="T8">:s/foo/bar <text:s text:c="5"/>Change first "foo" to "bar" on line</text:span></text:span></text:p>
      <text:p text:style-name="P12"><text:span text:style-name="Source_20_Text"><text:span text:style-name="T8">:s/foo/bar/g <text:s text:c="3"/>Change all "foo" to "bar" on line</text:span></text:span></text:p>
      <text:h text:style-name="P8" text:outline-level="3">Command Mode Navigation</text:h>
      <text:p text:style-name="Preformatted_20_Text"><text:span text:style-name="Source_20_Text"><text:span text:style-name="T8">BACKSPACE <text:s text:c="6"/>Delete character in command</text:span></text:span></text:p>
      <text:p text:style-name="Preformatted_20_Text"><text:span text:style-name="Source_20_Text"><text:span text:style-name="T8">BACKSPACE <text:s text:c="6"/>(when empty) Exit to NORMAL mode</text:span></text:span></text:p>
      <text:p text:style-name="Preformatted_20_Text"><text:span text:style-name="Source_20_Text"><text:span text:style-name="T8">ENTER <text:s text:c="10"/>Execute command</text:span></text:span></text:p>
      <text:p text:style-name="P12"><text:span text:style-name="Source_20_Text"><text:span text:style-name="T8">ESC <text:s text:c="12"/>Cancel command, return to NORMAL</text:span></text:span></text:p>
      <text:p text:style-name="P2"/>
      <text:h text:style-name="P6" text:outline-level="2">QUICK EXAMPLES</text:h>
      <text:h text:style-name="P8" text:outline-level="3">Example 1: Delete &amp; Paste</text:h>
      <text:p text:style-name="Preformatted_20_Text"><text:span text:style-name="Source_20_Text"><text:span text:style-name="T8">dd <text:s text:c="13"/>Delete current line</text:span></text:span></text:p>
      <text:p text:style-name="Preformatted_20_Text"><text:span text:style-name="Source_20_Text"><text:span text:style-name="T8">p <text:s text:c="14"/>Paste it below</text:span></text:span></text:p>
      <text:p text:style-name="P12"><text:span text:style-name="Source_20_Text"><text:span text:style-name="T8">P <text:s text:c="14"/>Or paste it above</text:span></text:span></text:p>
      <text:h text:style-name="P8" text:outline-level="3">Example 2: Multiple Deletes</text:h>
      <text:p text:style-name="Preformatted_20_Text"><text:span text:style-name="Source_20_Text"><text:span text:style-name="T8">5dd <text:s text:c="12"/>Delete 5 lines</text:span></text:span></text:p>
      <text:p text:style-name="P12"><text:soft-page-break/><text:span text:style-name="Source_20_Text"><text:span text:style-name="T8">3dd <text:s text:c="12"/>Delete 3 lines</text:span></text:span></text:p>
      <text:h text:style-name="P8" text:outline-level="3">Example 3: Word Replacement</text:h>
      <text:p text:style-name="Preformatted_20_Text"><text:span text:style-name="Source_20_Text"><text:span text:style-name="T8">dw <text:s text:c="13"/>Delete word (not built-in, use manual)</text:span></text:span></text:p>
      <text:p text:style-name="Preformatted_20_Text"><text:span text:style-name="Source_20_Text"><text:span text:style-name="T8">i <text:s text:c="14"/>Insert replacement</text:span></text:span></text:p>
      <text:p text:style-name="Preformatted_20_Text"><text:span text:style-name="Source_20_Text"><text:span text:style-name="T8">type <text:s text:c="11"/>new word</text:span></text:span></text:p>
      <text:p text:style-name="P12"><text:span text:style-name="Source_20_Text"><text:span text:style-name="T8">ESC <text:s text:c="12"/>Back to NORMAL</text:span></text:span></text:p>
      <text:p text:style-name="Text_20_body"><text:span text:style-name="Strong_20_Emphasis"><text:span text:style-name="T8">Better way:</text:span></text:span></text:p>
      <text:p text:style-name="P12"><text:span text:style-name="Source_20_Text"><text:span text:style-name="T8">:s/oldword/newword/g <text:s text:c="3"/>Replace all on line</text:span></text:span></text:p>
      <text:h text:style-name="P8" text:outline-level="3">Example 4: Undo Typing Mistake</text:h>
      <text:p text:style-name="Preformatted_20_Text"><text:span text:style-name="Source_20_Text"><text:span text:style-name="T8">[Type some text with typo]</text:span></text:span></text:p>
      <text:p text:style-name="Preformatted_20_Text"><text:span text:style-name="Source_20_Text"><text:span text:style-name="T8">ESC <text:s text:c="12"/>Back to NORMAL</text:span></text:span></text:p>
      <text:p text:style-name="Preformatted_20_Text"><text:span text:style-name="Source_20_Text"><text:span text:style-name="T8">u <text:s text:c="14"/>Undo entire typed phrase</text:span></text:span></text:p>
      <text:p text:style-name="Preformatted_20_Text"><text:span text:style-name="Source_20_Text"><text:span text:style-name="T8">i <text:s text:c="14"/>Retype correctly</text:span></text:span></text:p>
      <text:p text:style-name="P12"><text:span text:style-name="Source_20_Text"><text:span text:style-name="T8">ESC</text:span></text:span></text:p>
      <text:h text:style-name="P8" text:outline-level="3">Example 5: Indent Code Block</text:h>
      <text:p text:style-name="Preformatted_20_Text"><text:span text:style-name="Source_20_Text"><text:span text:style-name="T8">3&gt;&gt; <text:s text:c="12"/>Indent 3 lines (add 4 spaces each)</text:span></text:span></text:p>
      <text:p text:style-name="P12"><text:span text:style-name="Source_20_Text"><text:span text:style-name="T8">2&lt;&lt; <text:s text:c="12"/>Unindent 2 lines (remove 4 spaces)</text:span></text:span></text:p>
      <text:h text:style-name="P8" text:outline-level="3">Example 6: Find &amp; Replace</text:h>
      <text:p text:style-name="Preformatted_20_Text"><text:span text:style-name="Source_20_Text"><text:span text:style-name="T8">/TODO <text:s text:c="10"/>Search for "TODO"</text:span></text:span></text:p>
      <text:p text:style-name="Preformatted_20_Text"><text:span text:style-name="Source_20_Text"><text:span text:style-name="T8">n <text:s text:c="14"/>Next occurrence</text:span></text:span></text:p>
      <text:p text:style-name="P12"><text:span text:style-name="Source_20_Text"><text:span text:style-name="T8">:s/TODO/DONE/g <text:s/>Replace all "TODO" with "DONE" on line</text:span></text:span></text:p>
      <text:p text:style-name="P2"/>
      <text:h text:style-name="P6" text:outline-level="2">SPECIAL NOTES</text:h>
      <text:h text:style-name="P8" text:outline-level="3">Zero (0) Handling</text:h>
      <text:p text:style-name="Preformatted_20_Text"><text:span text:style-name="Source_20_Text"><text:span text:style-name="T8">0 <text:s text:c="6"/>Move to line start (NOT interpreted as part of count)</text:span></text:span></text:p>
      <text:p text:style-name="P12"><text:span text:style-name="Source_20_Text"><text:span text:style-name="T8">10j <text:s text:c="4"/>Down 10 lines (0 starts a count, but 0 alone = line start)</text:span></text:span></text:p>
      <text:h text:style-name="P8" text:outline-level="3">Yanking Large Blocks</text:h>
      <text:p text:style-name="Preformatted_20_Text"><text:span text:style-name="Source_20_Text"><text:span text:style-name="T8">5yy <text:s text:c="12"/>Yank 5 lines</text:span></text:span></text:p>
      <text:p text:style-name="P12"><text:span text:style-name="Source_20_Text"><text:span text:style-name="T8">p <text:s text:c="14"/>Paste once (pastes all 5)</text:span></text:span></text:p>
      <text:h text:style-name="P8" text:outline-level="3">Counts Work Everywhere</text:h>
      <text:p text:style-name="Preformatted_20_Text"><text:span text:style-name="Source_20_Text"><text:span text:style-name="T8">3h <text:s text:c="13"/>Left 3</text:span></text:span></text:p>
      <text:p text:style-name="Preformatted_20_Text"><text:span text:style-name="Source_20_Text"><text:span text:style-name="T8">5j <text:s text:c="13"/>Down 5</text:span></text:span></text:p>
      <text:p text:style-name="Preformatted_20_Text"><text:span text:style-name="Source_20_Text"><text:span text:style-name="T8">10dd <text:s text:c="11"/>Delete 10 lines</text:span></text:span></text:p>
      <text:p text:style-name="Preformatted_20_Text"><text:span text:style-name="Source_20_Text"><text:span text:style-name="T8">3&gt;&gt; <text:s text:c="12"/>Indent 3 lines</text:span></text:span></text:p>
      <text:p text:style-name="P12"><text:span text:style-name="Source_20_Text"><text:span text:style-name="T8">2&lt;&lt; <text:s text:c="12"/>Unindent 2 lines</text:span></text:span></text:p>
      <text:h text:style-name="P8" text:outline-level="3"><text:soft-page-break/>Search is Case-Insensitive</text:h>
      <text:p text:style-name="Preformatted_20_Text"><text:span text:style-name="Source_20_Text"><text:span text:style-name="T8">/Foo <text:s text:c="11"/>Matches "foo", "FOO", "Foo"</text:span></text:span></text:p>
      <text:p text:style-name="P12"><text:span text:style-name="Source_20_Text"><text:span text:style-name="T8">/TODO <text:s text:c="10"/>Matches "todo", "TODO", "Todo"</text:span></text:span></text:p>
      <text:h text:style-name="P8" text:outline-level="3">Unsaved Changes</text:h>
      <text:p text:style-name="Text_20_body"><text:span text:style-name="T8">Status bar shows </text:span><text:span text:style-name="Source_20_Text"><text:span text:style-name="T8">[+]</text:span></text:span><text:span text:style-name="T8"> indicator if file has unsaved changes:</text:span></text:p>
      <text:p text:style-name="Preformatted_20_Text"><text:span text:style-name="Source_20_Text"><text:span text:style-name="T8">myfile.txt[+] <text:s text:c="2"/>← Unsaved</text:span></text:span></text:p>
      <text:p text:style-name="P12"><text:span text:style-name="Source_20_Text"><text:span text:style-name="T8">myfile.txt <text:s text:c="5"/>← Saved</text:span></text:span></text:p>
      <text:p text:style-name="P2"/>
      <text:h text:style-name="P5" text:outline-level="2"><text:span text:style-name="T8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RW Bookman" svg:font-family="'URW Bookman'" style:font-pitch="variable"/>
    <style:font-face style:name="var font-mono" svg:font-family="'var font-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0T07:49:32.360155447</meta:creation-date>
    <dc:date>2026-06-10T07:50:43.866364601</dc:date>
    <meta:editing-duration>PT1M13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5" meta:paragraph-count="137" meta:word-count="699" meta:character-count="4563" meta:non-whitespace-character-count="3187"/>
  </office:meta>
</office:document-meta>
</file>